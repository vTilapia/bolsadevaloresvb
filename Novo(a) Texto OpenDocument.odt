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62957" officeooo:paragraph-rsid="00062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PRESENTAR A PROPOSTA</text:p>
      <text:p text:style-name="P1"/>
      <text:p text:style-name="P1">A proposta consiste em uma dinâmica complexa e contínua, que terá duração de várias aulas e será desenvolvida em conjunto com outras matérias da disciplina.</text:p>
      <text:p text:style-name="P1">É uma simulação de Bolsa de Valores, com empresas fictícias, notícias fictícias e dinheiro fictício, mas com um nível complexo de simulação onde ocorrem variações realistas dos preços de ações.</text:p>
      <text:p text:style-name="P1"/>
      <text:p text:style-name="P1">O objetivo é apresentar o mercado de ações de forma completa. </text:p>
      <text:p text:style-name="P1"/>
      <text:p text:style-name="P1"/>
      <text:p text:style-name="P1">2 FUNCIONAMENTO DO MERCADO DE AÇÕES</text:p>
      <text:p text:style-name="P1"/>
      <text:p text:style-name="P1">O mercado de ações é simulado por um programa de computador que busca replicar a realidade. O elemento base que influência na variação dos preços das ações é pseudo-aleatório. É randômico dentro de um intervalo assimétrico e depende de alguns fatores adicionais como volatilidade (risco da atividade empresarial), expectativas (projeções a longo prazo) e eventos (notícias que influenciam positivamente ou negativamente na variação dos preços das ações, podendo ser eventos leves ou drásticos).</text:p>
      <text:p text:style-name="P1"/>
      <text:p text:style-name="P1">As equipes de investidoes podem acompanhar a Bolsa de Valores, lendo notícias, avaliando gráficos, interpretando as tabelas do mercado etc. e realizarem ordens de compra e venda de ações, por meio de formulário disponibilizado pela própria bolsa de valores. Além disso, as equipes podem acessar suas carteiras e verificar saldos e quantidades de ações em seu patrimônio.</text:p>
      <text:p text:style-name="P1"/>
      <text:p text:style-name="P1">A Bolsa de Valores é atualizada duas vezes por semana (no dia da aula de Educaçao Financeira, antes e durante a aula). A Bolsa recebe atualizações no mercado de ações, notícias e atualização dos gráficos históricos. os alunos tem essas oportunidades para realizar suas ordens de compra e venda.</text:p>
      <text:p text:style-name="P1"/>
      <text:p text:style-name="P1"/>
      <text:p text:style-name="P2">3 BREVE DEMONSTRAÇÃO</text:p>
      <text:p text:style-name="P2"/>
      <text:p text:style-name="P2">a) apresentação do núcleo da bolsa de valores</text:p>
      <text:p text:style-name="P2">b) apresentação do site, mostrando página inicial e as demais abas, todas resetadas</text:p>
      <text:p text:style-name="P2">c) iniciar o primeiro pregão e atualizar o site, mostrando mercado, gráfico, notícias e carteiras</text:p>
      <text:p text:style-name="P2">d) atualizar pela segunda vez, mostrando a nova tabela do mercado, o gráficos</text:p>
      <text:p text:style-name="P2">e) simular uma ordem de compra de ações</text:p>
      <text:p text:style-name="P2">f) executar a ordem no núcleo da bolsa</text:p>
      <text:p text:style-name="P2">g) atualizar o site com o ordem executada</text:p>
      <text:p text:style-name="P2">h) rodar novo pregão para mostrar a variação das açoes, novas notícias e analisar resultados</text:p>
      <text:p text:style-name="P2">i) simular nova ordem com a compra de mais ações</text:p>
      <text:p text:style-name="P2">j) atualizar o site com a ordem executada</text:p>
      <text:p text:style-name="P2">k) rodar novo pregão</text:p>
      <text:p text:style-name="P2">l) simular nova ordem de compra e VEN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01:12:38.634890100</meta:creation-date>
    <dc:date>2026-06-19T01:17:45.930098800</dc:date>
    <meta:editing-duration>PT5M7S</meta:editing-duration>
    <meta:editing-cycles>1</meta:editing-cycles>
    <meta:document-statistic meta:table-count="0" meta:image-count="0" meta:object-count="0" meta:page-count="1" meta:paragraph-count="21" meta:word-count="376" meta:character-count="2307" meta:non-whitespace-character-count="1951"/>
    <meta:generator>LibreOffice/25.2.7.2$Windows_X86_64 LibreOffice_project/5cbfd1ab6520636bb5f7b99185aa69bd7456825d</meta:generator>
  </office:meta>
</office:document-meta>
</file>